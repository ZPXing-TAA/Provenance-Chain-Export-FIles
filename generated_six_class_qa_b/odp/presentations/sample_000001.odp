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4c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cdbb98" svg:stroke-linecap="butt" draw:fill="solid" draw:fill-color="#af7d4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26cm" svg:stroke-color="#cdbb98" svg:stroke-linecap="butt" draw:fill="solid" draw:fill-color="#f8ef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cdbb98" svg:stroke-linecap="butt" draw:fill="solid" draw:fill-color="#f8ef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cdbb98" svg:stroke-linecap="butt" draw:fill="solid" draw:fill-color="#f8ef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af7d4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f8efd9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6b2d2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1f1a12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3" style:family="text">
      <style:text-properties fo:font-variant="normal" fo:text-transform="none" fo:color="#6f614a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1f1a12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6b2d2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b2d2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f1a1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f614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1" draw:layer="layout" svg:width="2.007cm" svg:height="2.007cm" svg:x="18.009cm" svg:y="21.4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2" draw:style-name="gr1" draw:text-style-name="P1" draw:layer="layout" svg:width="2.932cm" svg:height="2.932cm" svg:x="11.939cm" svg:y="23.874cm">
          <text:p/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" draw:style-name="gr1" draw:text-style-name="P1" draw:layer="layout" svg:width="2.688cm" svg:height="2.688cm" svg:x="22.935cm" svg:y="5.7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1" draw:text-style-name="P1" draw:layer="layout" svg:width="1.105cm" svg:height="1.105cm" svg:x="15.825cm" svg:y="36.0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iamond 5" draw:style-name="gr1" draw:text-style-name="P1" draw:layer="layout" svg:width="2.913cm" svg:height="2.913cm" svg:x="22.436cm" svg:y="6.823cm">
          <text:p/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6" draw:style-name="gr1" draw:text-style-name="P1" draw:layer="layout" svg:width="2.675cm" svg:height="2.675cm" svg:x="21.399cm" svg:y="7.8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3" draw:layer="layout" svg:width="23.621cm" svg:height="1.855cm" svg:x="2.133cm" svg:y="2.32cm">
          <text:p text:style-name="P2"><text:span text:style-name="T1">FIELD SUPPORT / XMC-5062-9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3" draw:layer="layout" svg:width="24.933cm" svg:height="9.281cm" svg:x="2.133cm" svg:y="4.641cm">
          <text:p text:style-name="P2"><text:span text:style-name="T2">Public Index Updated Publ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3" draw:layer="layout" svg:width="21.653cm" svg:height="4.64cm" svg:x="2.133cm" svg:y="13.922cm">
          <text:p text:style-name="P2"><text:span text:style-name="T3">Organizes tracks data notebook Data Services planning guide internal audits compac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3" draw:layer="layout" svg:width="19.028cm" svg:height="12.993cm" svg:x="2.133cm" svg:y="20.419cm">
          <text:p text:style-name="P2"><text:span text:style-name="T4">Reviews updates aligns route planner maintenance set focused planning guide.</text:span></text:p>
          <text:p text:style-name="P2"><text:span text:style-name="T4">Service quality notice energy usage Training public Field Support inventory review.</text:span></text:p>
          <text:p text:style-name="P2"><text:span text:style-name="T4">Notice public summary supports Logistics report rapid summary inventory review Research.</text:span></text:p>
          <text:p text:style-name="P2"><text:span text:style-name="T4">Program seasonal operations transport capacity measured roadmap inventory review Training compact measures overview.</text:span></text:p>
          <text:p text:style-name="P2"><text:span text:style-name="T4">Summary service desk Facilities sensor pack overview delivery rout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6" draw:text-style-name="P4" draw:layer="layout" svg:width="8.529cm" svg:height="4.176cm" svg:x="21.654cm" svg:y="23.204cm">
          <text:p text:style-name="P2"><text:span text:style-name="T5">91% <text:s/>Cost Index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2" draw:style-name="gr7" draw:text-style-name="P4" draw:layer="layout" svg:width="8.529cm" svg:height="4.176cm" svg:x="21.654cm" svg:y="28.773cm">
          <text:p text:style-name="P2"><text:span text:style-name="T5">68% <text:s/>Response Time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3" draw:style-name="gr8" draw:text-style-name="P4" draw:layer="layout" svg:width="8.529cm" svg:height="4.176cm" svg:x="21.654cm" svg:y="34.342cm">
          <text:p text:style-name="P2"><text:span text:style-name="T5">56% <text:s/>Coverage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华文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bold" style:font-name-complex="Arial Unicode MS" style:font-family-complex="'Arial Unicode M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808cm" fo:page-height="46.40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26.916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7.75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26.916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7.75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6.916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ntrolled-local-generator</meta:initial-creator>
    <dc:description>generated using python-pptx</dc:description>
    <dc:creator>controlled-local-generator</dc:creator>
    <meta:editing-cycles>1</meta:editing-cycles>
    <meta:creation-date>2020-01-01T00:00:00Z</meta:creation-date>
    <dc:date>2020-01-01T00:00:00Z</dc:date>
    <meta:editing-duration>PT1M</meta:editing-duration>
    <meta:generator>LibreOffice/26.2.4.2$MacOSX_AARCH64 LibreOffice_project/0229ac93fcf0d7cbc6376066c6f35021cef002dc</meta:generator>
    <meta:document-statistic meta:object-count="149"/>
    <meta:user-defined meta:name="AppVersion">14.0000</meta:user-defined>
    <meta:user-defined meta:name="PresentationFormat">On-screen Show (4:3)</meta:user-defined>
  </office:meta>
</office:document-meta>
</file>